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3000002005AA3A02BF9820EE3.png" manifest:media-type="image/png"/>
  <manifest:file-entry manifest:full-path="Pictures/1000000000000690000003794610A6611E16734E.jpg" manifest:media-type="image/jpeg"/>
  <manifest:file-entry manifest:full-path="Pictures/100000000000040A000002B8E48A321D3D2FB0E6.png" manifest:media-type="image/png"/>
  <manifest:file-entry manifest:full-path="Pictures/100000000000078000000397072513A83F51D3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1025a0" officeooo:paragraph-rsid="001025a0"/>
    </style:style>
    <style:style style:name="P2" style:family="paragraph" style:parent-style-name="Heading_20_1">
      <style:paragraph-properties fo:text-align="center" style:justify-single-word="false"/>
      <style:text-properties fo:color="#c9211e" loext:opacity="100%" style:font-name="Ink Free" fo:font-size="36pt" style:font-size-asian="36pt" style:font-size-complex="36pt"/>
    </style:style>
    <style:style style:name="T1" style:family="text">
      <style:text-properties officeooo:rsid="00116ff2"/>
    </style:style>
    <style:style style:name="T2" style:family="text">
      <style:text-properties officeooo:rsid="0012669d"/>
    </style:style>
    <style:style style:name="T3" style:family="text">
      <style:text-properties officeooo:rsid="0013836d"/>
    </style:style>
    <style:style style:name="T4" style:family="text">
      <style:text-properties officeooo:rsid="0014df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rukcja <text:span text:style-name="T1">korzystania z aplikacji</text:span></text:p>
      <text:p text:style-name="P1"/>
      <text:p text:style-name="P1">Wchodzimy na panel gdzie znajduje się lista produktów</text:p>
      <text:p text:style-name="P1"><text:a xlink:type="simple" xlink:href="https://www.ezebra.pl/panel/navigation.php?action=tree&amp;shop=1&amp;tree=99&amp;lang=pol" text:style-name="Internet_20_link" text:visited-style-name="Visited_20_Internet_20_Link">https://www.ezebra.pl/panel/navigation.php?action=tree&amp;shop=1&amp;tree=99&amp;lang=pol</text:a></text:p>
      <text:p text:style-name="P1"><draw:frame draw:style-name="fr2" draw:name="Obraz1" text:anchor-type="char" svg:x="0.159cm" svg:y="0.116cm" svg:width="17cm" svg:height="8.996cm" draw:z-index="0"><draw:image xlink:href="Pictures/1000000000000690000003794610A6611E16734E.jpg" xlink:type="simple" xlink:show="embed" xlink:actuate="onLoad" draw:mime-type="image/jpeg"/></draw:frame></text:p>
      <text:p text:style-name="P1">Zaznaczamy wszystkie produkty przypisane do strony i eksportujemy je w formacie .xml odpowiedniego sklepu.</text:p>
      <text:p text:style-name="P1"><draw:frame draw:style-name="fr2" draw:name="Obraz2" text:anchor-type="char" svg:x="0cm" svg:y="0.09cm" svg:width="17cm" svg:height="8.996cm" draw:z-index="1"><draw:image xlink:href="Pictures/100000000000078000000397072513A83F51D3DF.png" xlink:type="simple" xlink:show="embed" xlink:actuate="onLoad" draw:mime-type="image/png"/></draw:frame>Wrzucamy pobrany plik do folderu z aplikacją</text:p>
      <text:p text:style-name="P1"><draw:frame draw:style-name="fr2" draw:name="Obraz3" text:anchor-type="char" svg:x="0.185cm" svg:y="0.039cm" svg:width="17cm" svg:height="11.442cm" draw:z-index="2"><draw:image xlink:href="Pictures/100000000000040A000002B8E48A321D3D2FB0E6.png" xlink:type="simple" xlink:show="embed" xlink:actuate="onLoad" draw:mime-type="image/png"/></draw:frame><text:soft-page-break/></text:p>
      <text:p text:style-name="P1">Teraz uruchamiamy aplikację <text:span text:style-name="T2">run_xml.bat </text:span><text:span text:style-name="T3">(generuje output.xml), </text:span><text:span text:style-name="T2">a następnie </text:span>run_csv.bat. <text:span text:style-name="T4">Jeśli to konieczne kieruj się wyświetlanymi instrukcjami. </text:span></text:p>
      <text:h text:style-name="P2" text:outline-level="1">Koniec<draw:frame draw:style-name="fr1" draw:name="Obraz4" text:anchor-type="char" svg:width="17cm" svg:height="8.89cm" draw:z-index="3"><draw:image xlink:href="Pictures/10000000000003D3000002005AA3A02BF9820EE3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4:13:54.727000000</meta:creation-date>
    <dc:date>2026-03-26T12:36:10.151000000</dc:date>
    <meta:editing-duration>PT35M33S</meta:editing-duration>
    <meta:editing-cycles>6</meta:editing-cycles>
    <meta:generator>LibreOffice/7.5.4.2$Windows_X86_64 LibreOffice_project/36ccfdc35048b057fd9854c757a8b67ec53977b6</meta:generator>
    <meta:document-statistic meta:table-count="0" meta:image-count="4" meta:object-count="0" meta:page-count="2" meta:paragraph-count="7" meta:word-count="51" meta:character-count="467" meta:non-whitespace-character-count="422"/>
  </office:meta>
</office:document-meta>
</file>